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43d99" loext:opacity="100%"/>
    </style:style>
    <style:style style:name="P2" style:family="paragraph" style:parent-style-name="Standard">
      <style:paragraph-properties fo:margin-left="0cm" fo:margin-right="0cm" fo:margin-top="1.058cm" fo:margin-bottom="0.423cm" style:contextual-spacing="false" fo:text-indent="0cm" style:auto-text-indent="false"/>
      <style:text-properties fo:color="#000000" loext:opacity="100%" style:text-line-through-style="none" style:text-line-through-type="none" style:font-name="Google Sans" fo:font-size="16.5pt" style:text-underline-style="none" fo:font-weight="bold" style:text-blinking="false" loext:padding="0cm" loext:border="none"/>
    </style:style>
    <style:style style:name="P3" style:family="paragraph" style:parent-style-name="Standard">
      <style:paragraph-properties fo:margin-left="0cm" fo:margin-right="0cm" fo:margin-top="0.318cm" fo:margin-bottom="0.423cm" style:contextual-spacing="false" fo:text-indent="0cm" style:auto-text-indent="false"/>
      <style:text-properties fo:color="#000000" loext:opacity="100%"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43d99" loext:opacity="100%"/>
    </style:style>
    <style:style style:name="P5" style:family="paragraph" style:parent-style-name="Text_20_body">
      <style:paragraph-properties fo:margin-left="0cm" fo:margin-right="0cm" fo:margin-top="1.058cm" fo:margin-bottom="0.423cm" style:contextual-spacing="false" fo:text-indent="0cm" style:auto-text-indent="false"/>
      <style:text-properties fo:color="#000000" loext:opacity="100%" style:text-line-through-style="none" style:text-line-through-type="none" style:font-name="Google Sans" fo:font-size="16.5pt" style:text-underline-style="none" fo:font-weight="bold" style:text-blinking="false" loext:padding="0cm" loext:border="none"/>
    </style:style>
    <style:style style:name="P6" style:family="paragraph" style:parent-style-name="Text_20_body">
      <style:paragraph-properties fo:margin-left="0cm" fo:margin-right="0cm" fo:margin-top="0.318cm" fo:margin-bottom="0.423cm" style:contextual-spacing="false" fo:text-indent="0cm" style:auto-text-indent="false"/>
      <style:text-properties fo:color="#000000" loext:opacity="100%"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43d99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43d99" loext:opacity="100%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161ec6"/>
    </style:style>
    <style:style style:name="P11" style:family="paragraph" style:parent-style-name="Standard">
      <style:paragraph-properties fo:margin-left="0cm" fo:margin-right="0cm" fo:margin-top="0.318cm" fo:margin-bottom="0.423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normal" officeooo:paragraph-rsid="00161ec6" style:text-blinking="false" loext:padding="0cm" loext:border="none"/>
    </style:style>
    <style:style style:name="P12" style:family="paragraph" style:parent-style-name="Standard">
      <style:text-properties officeooo:paragraph-rsid="00161ec6"/>
    </style:style>
    <style:style style:name="P13" style:family="paragraph" style:parent-style-name="Standard">
      <style:paragraph-properties fo:margin-left="0cm" fo:margin-right="0cm" fo:margin-top="1.058cm" fo:margin-bottom="0.423cm" style:contextual-spacing="false" fo:text-indent="0cm" style:auto-text-indent="false"/>
      <style:text-properties style:text-line-through-style="none" style:text-line-through-type="none" style:font-name="Google Sans" fo:font-size="16.5pt" style:text-underline-style="none" fo:font-weight="bold" officeooo:paragraph-rsid="00161ec6" style:text-blinking="false" loext:padding="0cm" loext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161ec6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61ec6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61ec6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61ec6"/>
    </style:style>
    <style:style style:name="P1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style:text-line-through-style="none" style:text-line-through-type="none" style:font-name="Google Sans" fo:font-size="15pt" style:text-underline-style="none" fo:font-weight="bold" officeooo:paragraph-rsid="00161ec6" style:text-blinking="false" loext:padding="0cm" loext:border="non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161ec6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61ec6"/>
    </style:style>
    <style:style style:name="P21" style:family="paragraph" style:parent-style-name="Text_20_body">
      <style:paragraph-properties fo:margin-left="0cm" fo:margin-right="0cm" fo:margin-top="1.058cm" fo:margin-bottom="0.423cm" style:contextual-spacing="false" fo:text-indent="0cm" style:auto-text-indent="false"/>
      <style:text-properties style:text-line-through-style="none" style:text-line-through-type="none" style:font-name="Google Sans" fo:font-size="16.5pt" style:text-underline-style="none" fo:font-weight="bold" officeooo:paragraph-rsid="00161ec6" style:text-blinking="false" loext:padding="0cm" loext:border="none"/>
    </style:style>
    <style:style style:name="P22" style:family="paragraph" style:parent-style-name="Text_20_body">
      <style:paragraph-properties fo:margin-left="0cm" fo:margin-right="0cm" fo:margin-top="0.318cm" fo:margin-bottom="0.423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normal" officeooo:paragraph-rsid="00161ec6" style:text-blinking="false" loext:padding="0cm" loext:border="none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61ec6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161ec6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61ec6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161ec6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61ec6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Google Sans" fo:font-size="15pt" style:text-underline-style="none" fo:font-weight="bold" officeooo:paragraph-rsid="00161ec6" style:text-blinking="false" loext:padding="0cm" loext:border="none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padding="0cm" fo:border="none" style:writing-mode="lr-tb"/>
      <style:text-properties officeooo:paragraph-rsid="00161ec6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161ec6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line-through-style="none" style:text-line-through-type="none" style:font-name="Google Sans" fo:font-size="12pt" style:text-underline-style="none" fo:font-weight="normal" officeooo:paragraph-rsid="00161ec6" style:text-blinking="false" loext:padding="0cm" loext:border="none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line-through-style="none" style:text-line-through-type="none" style:font-name="Google Sans" fo:font-size="15pt" style:text-underline-style="none" fo:font-weight="bold" officeooo:paragraph-rsid="00161ec6" style:text-blinking="false" loext:padding="0cm" loext:border="none"/>
    </style:style>
    <style:style style:name="P33" style:family="paragraph" style:parent-style-name="Preformatted_20_Text" style:list-style-name="L8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161ec6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line-through-style="none" style:text-line-through-type="none" style:font-name="Google Sans" fo:font-size="9pt" style:text-underline-style="none" fo:font-weight="normal" officeooo:paragraph-rsid="00161ec6" style:text-blinking="false" loext:padding="0cm" loext:border="none"/>
    </style:style>
    <style:style style:name="P3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61ec6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161ec6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61ec6"/>
    </style:style>
    <style:style style:name="P38" style:family="paragraph" style:parent-style-name="Standard">
      <style:text-properties fo:color="#000000" loext:opacity="100%" officeooo:paragraph-rsid="00161ec6"/>
    </style:style>
    <style:style style:name="T1" style:family="text">
      <style:text-properties fo:color="#000000" loext:opacity="100%"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2" style:family="text">
      <style:text-properties fo:color="#000000" loext:opacity="100%"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T3" style:family="text">
      <style:text-properties fo:color="#000080" loext:opacity="100%" style:text-line-through-style="none" style:text-line-through-type="none" style:font-name="Google Sans" fo:font-size="12pt" style:text-underline-style="solid" style:text-underline-width="auto" style:text-underline-color="font-color" fo:font-weight="normal" style:text-blinking="false" loext:padding="0cm" loext:border="none"/>
    </style:style>
    <style:style style:name="T4" style:family="text">
      <style:text-properties fo:color="#000000" loext:opacity="100%" style:text-line-through-style="none" style:text-line-through-type="none" style:font-name="Google Sans" fo:font-size="12pt" style:text-underline-style="none" fo:font-weight="normal" style:text-blinking="false"/>
    </style:style>
    <style:style style:name="T5" style:family="text">
      <style:text-properties fo:color="#000080" loext:opacity="100%" style:text-line-through-style="none" style:text-line-through-type="none" style:font-name="Google Sans" fo:font-size="12pt" style:text-underline-style="solid" style:text-underline-width="auto" style:text-underline-color="font-color" fo:font-weight="normal" style:text-blinking="false"/>
    </style:style>
    <style:style style:name="T6" style:family="text">
      <style:text-properties fo:color="#000000" loext:opacity="100%" style:text-line-through-style="none" style:text-line-through-type="none" style:font-name="Google Sans" fo:font-size="12pt" style:text-underline-style="solid" style:text-underline-width="auto" style:text-underline-color="font-color" fo:font-weight="bold" style:text-blinking="false" loext:padding="0cm" loext:border="none"/>
    </style:style>
    <style:style style:name="T7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8" style:family="text"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T9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2c2e35"/>
    </style:style>
    <style:style style:name="T10" style:family="text">
      <style:text-properties style:text-line-through-style="none" style:text-line-through-type="none" style:font-name="Google Sans" fo:font-size="12pt" style:text-underline-style="solid" style:text-underline-width="auto" style:text-underline-color="font-color" fo:font-weight="bold" style:text-blinking="false" loext:padding="0cm" loext:border="none"/>
    </style:style>
    <style:style style:name="T11" style:family="text">
      <style:text-properties style:text-line-through-style="none" style:text-line-through-type="none" fo:font-family="monospace" fo:font-size="10.5pt" style:text-underline-style="none" fo:font-weight="normal" style:text-blinking="false" loext:padding="0cm" loext:border="none"/>
    </style:style>
    <style:style style:name="T12" style:family="text">
      <style:text-properties style:text-line-through-style="none" style:text-line-through-type="none" style:text-underline-style="none" style:text-blinking="false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mo podemos poner a dos IAs a trabajar juntas, de forma que se retroalimenten y discutan para ponerse de acuerdo y validar de forma conjunta un proyecto</text:p>
      <text:p text:style-name="P1"/>
      <text:p text:style-name="P1"><text:span text:style-name="T1">Para lograr que dos IAs trabajen juntas de forma autónoma, discutan y validen un proyecto, la clave es implementar un </text:span><text:span text:style-name="Strong_20_Emphasis"><text:span text:style-name="T2">sistema multiagente</text:span></text:span><text:span text:style-name="T1">. Este enfoque permite que diferentes modelos de lenguaje (LLMs) interactúen entre sí, dividiendo tareas complejas en microtareas. [</text:span><text:a xlink:type="simple" xlink:href="https://www.youtube.com/watch?v=lo9xZWYJQeY" text:style-name="Internet_20_link" text:visited-style-name="Visited_20_Internet_20_Link"><text:span text:style-name="T3">1</text:span></text:a><text:span text:style-name="T1">, </text:span><text:a xlink:type="simple" xlink:href="https://www.youtube.com/shorts/FLCG6MVUBiU" text:style-name="Internet_20_link" text:visited-style-name="Visited_20_Internet_20_Link"><text:span text:style-name="T3">2</text:span></text:a><text:span text:style-name="T1">, </text:span><text:a xlink:type="simple" xlink:href="https://cloud.google.com/discover/what-is-a-multi-agent-system?hl=es" text:style-name="Internet_20_link" text:visited-style-name="Visited_20_Internet_20_Link"><text:span text:style-name="T3">3</text:span></text:a><text:span text:style-name="T1">]</text:span></text:p>
      <text:p text:style-name="P2">Pasos para configurar la colaboración y discusión</text:p>
      <text:p text:style-name="P3">Para que la retroalimentación sea efectiva, sigue estas estrategias:</text:p>
      <text:list text:style-name="L1">
        <text:list-item>
          <text:p text:style-name="P4"><text:span text:style-name="Strong_20_Emphasis"><text:span text:style-name="T2">Definición de Roles Específicos:</text:span></text:span><text:span text:style-name="T1"> No trates a las IAs como asistentes genéricos. Asigna a una el rol de "Arquitecto del Proyecto" (creador) y a la otra el de "Crítico Externo" o "Auditor".</text:span></text:p>
        </text:list-item>
        <text:list-item>
          <text:p text:style-name="P4"><text:span text:style-name="Strong_20_Emphasis"><text:span text:style-name="T2">Establecimiento de un Protocolo de Debate:</text:span></text:span><text:span text:style-name="T1"> Configura una secuencia donde la IA "A" propone una idea, la IA "B" busca fallos o mejoras, y la IA "A" debe ajustar su propuesta basándose en esas críticas.</text:span></text:p>
        </text:list-item>
        <text:list-item>
          <text:p text:style-name="P4"><text:span text:style-name="Strong_20_Emphasis"><text:span text:style-name="T2">Encadenamiento de Prompts (Prompt Chaining):</text:span></text:span><text:span text:style-name="T1"> Utiliza una estructura donde la salida de una IA sea automáticamente la entrada de la otra. Esto crea un flujo continuo de retroalimentación sin intervención humana constante.</text:span></text:p>
        </text:list-item>
        <text:list-item>
          <text:p text:style-name="P4"><text:span text:style-name="Strong_20_Emphasis"><text:span text:style-name="T2">Uso de Metodologías Activas:</text:span></text:span><text:span text:style-name="T1"> Aplica técnicas de </text:span><text:span text:style-name="Strong_20_Emphasis"><text:span text:style-name="T2">razonamiento paso a paso</text:span></text:span><text:span text:style-name="T1"> (Chain-of-Thought) para que cada IA explique su lógica antes de llegar a una conclusión, permitiendo que la otra IA rebata puntos específicos.</text:span><text:span text:style-name="T4"> [</text:span><text:a xlink:type="simple" xlink:href="https://es.linkedin.com/pulse/casos-de-uso-reales-sistemas-multiagente-antonio-soto-dsaif" text:style-name="Internet_20_link" text:visited-style-name="Visited_20_Internet_20_Link"><text:span text:style-name="T5">1</text:span></text:a><text:span text:style-name="T4">, </text:span><text:a xlink:type="simple" xlink:href="https://translate.google.com/translate?u=https://www.linkedin.com/posts/how-to-ai-guide_how-to-get-better-ai-outputs-before-prompting-activity-7425176368348475393-SSAc&amp;hl=es&amp;sl=en&amp;tl=es&amp;client=sge" text:style-name="Internet_20_link" text:visited-style-name="Visited_20_Internet_20_Link"><text:span text:style-name="T5">2</text:span></text:a><text:span text:style-name="T4">, </text:span><text:a xlink:type="simple" xlink:href="https://www.reddit.com/r/ThinkingDeeplyAI/comments/1rqreme/looking_for_a_way_to_let_two_ai_models_debate/?tl=es-419" text:style-name="Internet_20_link" text:visited-style-name="Visited_20_Internet_20_Link"><text:span text:style-name="T5">3</text:span></text:a><text:span text:style-name="T4">, </text:span><text:a xlink:type="simple" xlink:href="https://aprenderadebatir.es/index.php/2013-05-14-12-25-08/reglas-basicas" text:style-name="Internet_20_link" text:visited-style-name="Visited_20_Internet_20_Link"><text:span text:style-name="T5">4</text:span></text:a><text:span text:style-name="T4">, </text:span><text:a xlink:type="simple" xlink:href="https://www.cyberclick.es/numerical-blog/encadena-prompts-para-mejorar-las-respuestas-de-la-ia" text:style-name="Internet_20_link" text:visited-style-name="Visited_20_Internet_20_Link"><text:span text:style-name="T5">5</text:span></text:a><text:span text:style-name="T4">, </text:span><text:a xlink:type="simple" xlink:href="https://www.adrformacion.com/knowledge/inteligencia-artificial/como_inducir_un_razonamiento_paso_a_paso_en_tus_prompts.html" text:style-name="Internet_20_link" text:visited-style-name="Visited_20_Internet_20_Link"><text:span text:style-name="T5">6</text:span></text:a><text:span text:style-name="T4">, </text:span><text:a xlink:type="simple" xlink:href="https://welov.io/blog/4-tecnicas-inesperadas-para-mejorar-las-respuestas-de-la-ia" text:style-name="Internet_20_link" text:visited-style-name="Visited_20_Internet_20_Link"><text:span text:style-name="T5">7</text:span></text:a><text:span text:style-name="T4">]</text:span></text:p>
        </text:list-item>
      </text:list>
      <text:p text:style-name="P5">Herramientas y plataformas para orquestar la interacción</text:p>
      <text:p text:style-name="P6">Existen soluciones diseñadas específicamente para facilitar este diálogo:</text:p>
      <text:list text:style-name="L2">
        <text:list-item>
          <text:p text:style-name="P7"><text:span text:style-name="Strong_20_Emphasis"><text:span text:style-name="T2">Frameworks de Agentes:</text:span></text:span><text:span text:style-name="T1"> Herramientas como </text:span><text:a xlink:type="simple" xlink:href="https://www.langflow.org/" office:target-frame-name="_blank" xlink:show="new" text:style-name="Internet_20_link" text:visited-style-name="Visited_20_Internet_20_Link"><text:span text:style-name="T6">Langflow</text:span></text:a><text:span text:style-name="T1"> o </text:span><text:span text:style-name="Strong_20_Emphasis"><text:span text:style-name="T2">CrewAI</text:span></text:span><text:span text:style-name="T1"> permiten diseñar flujos donde varios agentes de IA colaboran, se coordinan y comparten un entorno de trabajo.</text:span></text:p>
        </text:list-item>
        <text:list-item>
          <text:p text:style-name="P7"><text:span text:style-name="Strong_20_Emphasis"><text:span text:style-name="T2">Plataformas de Unificación:</text:span></text:span><text:span text:style-name="T1"> Sitios como </text:span><text:a xlink:type="simple" xlink:href="https://abacus.ai/" office:target-frame-name="_blank" xlink:show="new" text:style-name="Internet_20_link" text:visited-style-name="Visited_20_Internet_20_Link"><text:span text:style-name="T6">Chat LLM de Abacus.ai</text:span></text:a><text:span text:style-name="T1"> permiten gestionar múltiples modelos simultáneamente para comparar sus resultados en un mismo hilo.</text:span></text:p>
        </text:list-item>
        <text:list-item>
          <text:p text:style-name="P7"><text:span text:style-name="Strong_20_Emphasis"><text:span text:style-name="T2">Entornos de Conversación:</text:span></text:span><text:span text:style-name="T1"> Plataformas como </text:span><text:span text:style-name="Strong_20_Emphasis"><text:span text:style-name="T2">Character.ai</text:span></text:span><text:span text:style-name="T1"> permiten crear salas donde dos o más personajes de IA interactúan directamente bajo un contexto común definido por ti.</text:span></text:p>
        </text:list-item>
        <text:list-item>
          <text:p text:style-name="P7"><text:span text:style-name="Strong_20_Emphasis"><text:span text:style-name="T2">Redes de Agentes:</text:span></text:span><text:span text:style-name="T1"> Proyectos emergentes como </text:span><text:span text:style-name="Strong_20_Emphasis"><text:span text:style-name="T2">Molbook</text:span></text:span><text:span text:style-name="T1"> están creando espacios donde las IAs tienen su propia reputación y colaboran para resolver problemas complejos de forma descentralizada.</text:span><text:span text:style-name="T4"> [</text:span><text:a xlink:type="simple" xlink:href="https://www.datacamp.com/es/blog/top-ai-agent-projects" text:style-name="Internet_20_link" text:visited-style-name="Visited_20_Internet_20_Link"><text:span text:style-name="T5">1</text:span></text:a><text:span text:style-name="T4">, </text:span><text:a xlink:type="simple" xlink:href="https://www.tiktok.com/@pagutiles/video/7534823145555987734" text:style-name="Internet_20_link" text:visited-style-name="Visited_20_Internet_20_Link"><text:span text:style-name="T5">2</text:span></text:a><text:span text:style-name="T4">, </text:span><text:a xlink:type="simple" xlink:href="https://www.tiktok.com/@bitsibombon/video/7234678942337158405" text:style-name="Internet_20_link" text:visited-style-name="Visited_20_Internet_20_Link"><text:span text:style-name="T5">3</text:span></text:a><text:span text:style-name="T4">, </text:span><text:a xlink:type="simple" xlink:href="https://www.youtube.com/shorts/0LtFLq41ejk" text:style-name="Internet_20_link" text:visited-style-name="Visited_20_Internet_20_Link"><text:span text:style-name="T5">4</text:span></text:a><text:span text:style-name="T4">, </text:span><text:a xlink:type="simple" xlink:href="https://www.youtube.com/shorts/FLCG6MVUBiU" text:style-name="Internet_20_link" text:visited-style-name="Visited_20_Internet_20_Link"><text:span text:style-name="T5">5</text:span></text:a><text:span text:style-name="T4">]</text:span></text:p>
        </text:list-item>
      </text:list>
      <text:p text:style-name="P8"><text:span text:style-name="T1">Para asegurar el éxito, es fundamental que tú actúes como </text:span><text:span text:style-name="Strong_20_Emphasis"><text:span text:style-name="T2">moderador o supervisor</text:span></text:span><text:span text:style-name="T1">, interviniendo ocasionalmente para evitar que la discusión entre en bucle o se desvíe del objetivo principal. [</text:span><text:a xlink:type="simple" xlink:href="https://www.youtube.com/shorts/ctgnuLYKlTQ" text:style-name="Internet_20_link" text:visited-style-name="Visited_20_Internet_20_Link"><text:span text:style-name="T3">1</text:span></text:a><text:span text:style-name="T1">, </text:span><text:a xlink:type="simple" xlink:href="https://www.reddit.com/r/ThinkingDeeplyAI/comments/1rqreme/looking_for_a_way_to_let_two_ai_models_debate/?tl=es-419" text:style-name="Internet_20_link" text:visited-style-name="Visited_20_Internet_20_Link"><text:span text:style-name="T3">2</text:span></text:a><text:span text:style-name="T1">]</text:span></text:p>
      <text:p text:style-name="P9"/>
      <text:p text:style-name="P9"><text:soft-page-break/></text:p>
      <text:p text:style-name="P9"><text:span text:style-name="T7">¿Te gustaría que te ayude a redactar los </text:span><text:span text:style-name="Strong_20_Emphasis"><text:span text:style-name="T8">prompts específicos</text:span></text:span><text:span text:style-name="T7"> para los roles de "Creador" y "Crítico" de tu proyecto?</text:span></text:p>
      <text:p text:style-name="P9"/>
      <text:p text:style-name="P9"/>
      <text:p text:style-name="P9">-----------------------------------------------------------------------------------------------------------------------</text:p>
      <text:p text:style-name="P9"/>
      <text:p text:style-name="P10"><text:span text:style-name="T7">Aquí tienes un ejemplo práctico utilizando </text:span><text:span text:style-name="Strong_20_Emphasis"><text:span text:style-name="T8">Microsoft AutoGen</text:span></text:span><text:span text:style-name="T7">. Este código configura un entorno donde un </text:span><text:span text:style-name="Strong_20_Emphasis"><text:span text:style-name="T8">Programador</text:span></text:span><text:span text:style-name="T7"> y un </text:span><text:span text:style-name="Strong_20_Emphasis"><text:span text:style-name="T8">Analista de Ciberseguridad</text:span></text:span><text:span text:style-name="T7"> discuten y validan el código de forma autónoma.</text:span></text:p>
      <text:p text:style-name="P11">Para que funcione, los agentes se ejecutan en un entorno local (puedes usar Docker para mayor seguridad) para que el Auditor pueda realmente probar si el código funciona.</text:p>
      <text:p text:style-name="P12"/>
      <text:p text:style-name="P12"/>
      <text:p text:style-name="P12">import autogen<text:line-break/><text:line-break/># 1. Configuración de los modelos (puedes usar GPT-4o o Claude-3.5-Sonnet)<text:line-break/>config_list = [<text:line-break/> {<text:line-break/> "model": "gpt-4-turbo",<text:line-break/> "api_key": "TU_API_KEY_AQUÍ"<text:line-break/> }<text:line-break/>]<text:line-break/><text:line-break/># 2. Definición del Agente Programador (El que crea)<text:line-break/>engineer = autogen.AssistantAgent(<text:line-break/> name="Programador",<text:line-break/> llm_config={"config_list": config_list},<text:line-break/> system_message="""Eres un Ingeniero de Software Senior. <text:line-break/> Tu tarea es escribir código Python eficiente y funcional. <text:line-break/> Si el Auditor encuentra fallos de seguridad, DEBES corregirlos inmediatamente y presentar una nueva versión."""<text:line-break/>)<text:line-break/><text:line-break/># 3. Definición del Agente Auditor de Seguridad (El que critica y valida)<text:line-break/>security_auditor = autogen.AssistantAgent(<text:line-break/> name="Auditor_Seguridad",<text:line-break/> llm_config={"config_list": config_list},<text:line-break/> system_message="""Eres un experto en Ciberseguridad. <text:line-break/> Tu único trabajo es auditar el código que el Programador escribe.<text:line-break/> Buscas inyecciones, falta de validación de datos y vulnerabilidades OWASP.<text:line-break/> - Si el código es inseguro: Explica por qué y di 'RECHAZADO'.<text:line-break/> - Si el código es seguro y óptimo: Di 'APROBADO' y termina con la palabra 'TERMINATE'."""<text:line-break/>)<text:line-break/><text:line-break/># 4. Definición del Ejecutor (Para validar que el código corre)<text:line-break/>user_proxy = autogen.UserProxyAgent(<text:line-break/> name="Validador_Sistema",<text:line-break/> human_input_mode="NEVER",<text:line-break/> max_consecutive_auto_reply=10,<text:line-break/> is_termination_msg=lambda x: x.get("content", "").find("TERMINATE") &gt;= 0,<text:line-break/><text:soft-page-break/> code_execution_config={"work_dir": "proyecto_seguro", "use_docker": False} <text:line-break/>)<text:line-break/><text:line-break/># 5. Iniciamos la discusión del proyecto<text:line-break/>groupchat = autogen.GroupChat(agents=[user_proxy, engineer, security_auditor], messages=[], max_round=12)<text:line-break/>manager = autogen.GroupChatManager(groupchat=groupchat, llm_config={"config_list": config_list})<text:line-break/><text:line-break/>user_proxy.initiate_chat(<text:line-break/> <text:s text:c="3"/>manager,<text:line-break/> <text:s text:c="3"/>message="""Crea un script de Python que reciba una URL de un usuario, <text:line-break/> <text:s text:c="3"/>descargue un archivo JSON de esa URL y lo guarde en una base de datos SQLite local."""<text:line-break/>)</text:p>
      <text:p text:style-name="P12"/>
      <text:p text:style-name="P12"/>
      <text:p text:style-name="P13">¿Qué sucederá al ejecutar esto?</text:p>
      <text:list text:style-name="L3">
        <text:list-item>
          <text:p text:style-name="P14"><text:span text:style-name="Strong_20_Emphasis"><text:span text:style-name="T8">El Programador</text:span></text:span><text:span text:style-name="T7"> escribirá un script rápido (probablemente usando </text:span><text:span text:style-name="Source_20_Text"><text:span text:style-name="T9">requests</text:span></text:span><text:span text:style-name="T7"> y </text:span><text:span text:style-name="Source_20_Text"><text:span text:style-name="T9">sqlite3</text:span></text:span><text:span text:style-name="T7">).</text:span></text:p>
        </text:list-item>
        <text:list-item>
          <text:p text:style-name="P15"><text:span text:style-name="Strong_20_Emphasis"><text:span text:style-name="T8">El Auditor</text:span></text:span><text:span text:style-name="T7"> analizará el código. Probablemente dirá: </text:span><text:span text:style-name="Emphasis"><text:span text:style-name="T7">"¡Cuidado! Si la URL no está validada, podrían hacerte un ataque SSRF o inyectar código en la DB"</text:span></text:span><text:span text:style-name="T7">.</text:span></text:p>
        </text:list-item>
        <text:list-item>
          <text:p text:style-name="P15"><text:span text:style-name="Strong_20_Emphasis"><text:span text:style-name="T8">El Programador</text:span></text:span><text:span text:style-name="T7"> recibirá el feedback y reescribirá el código añadiendo validación de URLs y </text:span><text:span text:style-name="Emphasis"><text:span text:style-name="T7">prepared statements</text:span></text:span><text:span text:style-name="T7"> para SQL.</text:span></text:p>
        </text:list-item>
        <text:list-item>
          <text:p text:style-name="P15"><text:span text:style-name="T7">Este ciclo se repetirá hasta que el Auditor escriba </text:span><text:span text:style-name="Strong_20_Emphasis"><text:span text:style-name="T8">"APROBADO"</text:span></text:span><text:span text:style-name="T7"> y </text:span><text:span text:style-name="Strong_20_Emphasis"><text:span text:style-name="T8">"TERMINATE"</text:span></text:span><text:span text:style-name="T7">.</text:span></text:p>
        </text:list-item>
      </text:list>
      <text:p text:style-name="P16"><text:span text:style-name="Strong_20_Emphasis"><text:span text:style-name="T8">Importante:</text:span></text:span><text:span text:style-name="T7"> Asegúrate de instalar la librería con </text:span><text:span text:style-name="Source_20_Text"><text:span text:style-name="T9">pip install pyautogen</text:span></text:span><text:span text:style-name="T7"> antes de probarlo.</text:span></text:p>
      <text:p text:style-name="P12"/>
      <text:p text:style-name="P12"/>
      <text:p text:style-name="P13">Paso 1: Preparar "la mesa de trabajo" (Instalación)</text:p>
      <text:p text:style-name="P11">Primero, necesitas un lugar donde ejecutar ese código.</text:p>
      <text:list text:style-name="L4">
        <text:list-item>
          <text:p text:style-name="P17"><text:span text:style-name="Strong_20_Emphasis"><text:span text:style-name="T8">Instala Python:</text:span></text:span><text:span text:style-name="T7"> Si no lo tienes, descárgalo en </text:span><text:a xlink:type="simple" xlink:href="https://www.python.org/" office:target-frame-name="_blank" xlink:show="new" text:style-name="Internet_20_link" text:visited-style-name="Visited_20_Internet_20_Link"><text:span text:style-name="T10">python.org</text:span></text:a><text:span text:style-name="T7">. Al instalarlo, asegúrate de marcar la casilla que dice </text:span><text:span text:style-name="Strong_20_Emphasis"><text:span text:style-name="T8">"Add Python to PATH"</text:span></text:span><text:span text:style-name="T7">.</text:span></text:p>
        </text:list-item>
        <text:list-item>
          <text:p text:style-name="P17"><text:span text:style-name="Strong_20_Emphasis"><text:span text:style-name="T8">Instala un editor:</text:span></text:span><text:span text:style-name="T7"> Descarga </text:span><text:a xlink:type="simple" xlink:href="https://code.visualstudio.com/" office:target-frame-name="_blank" xlink:show="new" text:style-name="Internet_20_link" text:visited-style-name="Visited_20_Internet_20_Link"><text:span text:style-name="T10">Visual Studio Code (VS Code)</text:span></text:a><text:span text:style-name="T7">. Es donde pegarás el código.</text:span></text:p>
        </text:list-item>
        <text:list-item>
          <text:p text:style-name="P17"><text:span text:style-name="Strong_20_Emphasis"><text:span text:style-name="T8">Instala la "librería" de los agentes:</text:span></text:span><text:span text:style-name="T7"> Abre la "Terminal" o "Símbolo del sistema" en tu ordenador y escribe esto:</text:span></text:p>
        </text:list-item>
      </text:list>
      <text:p text:style-name="P12"/>
      <text:p text:style-name="P18">bash</text:p>
      <text:p text:style-name="P19"><text:span text:style-name="Source_20_Text"><text:span text:style-name="T11">pip install pyautogen</text:span></text:span></text:p>
      <text:p text:style-name="P12"/>
      <text:list text:style-name="L5">
        <text:list-item>
          <text:p text:style-name="P20"><text:span text:style-name="Emphasis"><text:span text:style-name="T7">Esto descarga las herramientas necesarias para que las IAs hablen entre ellas.</text:span></text:span></text:p>
        </text:list-item>
      </text:list>
      <text:p text:style-name="P21"><text:soft-page-break/>Paso 2: Conseguir las "llaves" (API Key)</text:p>
      <text:p text:style-name="P22">El código necesita conectarse a la "mente" de la IA (en este caso, de OpenAI).</text:p>
      <text:list text:style-name="L6">
        <text:list-item>
          <text:p text:style-name="P23"><text:span text:style-name="T7">Ve a </text:span><text:a xlink:type="simple" xlink:href="https://platform.openai.com/" office:target-frame-name="_blank" xlink:show="new" text:style-name="Internet_20_link" text:visited-style-name="Visited_20_Internet_20_Link"><text:span text:style-name="T10">OpenAI Platform</text:span></text:a><text:span text:style-name="T7">.</text:span></text:p>
        </text:list-item>
        <text:list-item>
          <text:p text:style-name="P24"><text:span text:style-name="T7">Crea una </text:span><text:span text:style-name="Strong_20_Emphasis"><text:span text:style-name="T8">API Key</text:span></text:span><text:span text:style-name="T7"> (es una clave larga que empieza por </text:span><text:span text:style-name="Source_20_Text"><text:span text:style-name="T9">sk-...</text:span></text:span><text:span text:style-name="T7">).</text:span></text:p>
        </text:list-item>
        <text:list-item>
          <text:p text:style-name="P23"><text:span text:style-name="Strong_20_Emphasis"><text:span text:style-name="T8">Importante:</text:span></text:span><text:span text:style-name="T7"> Debes tener algo de saldo (unos 5€ bastan) en tu cuenta de OpenAI para que los agentes puedan "pensar".</text:span></text:p>
        </text:list-item>
      </text:list>
      <text:p text:style-name="P21">Paso 3: Crear el archivo del proyecto</text:p>
      <text:list text:style-name="L7">
        <text:list-item>
          <text:p text:style-name="P25"><text:span text:style-name="T7">Abre </text:span><text:span text:style-name="Strong_20_Emphasis"><text:span text:style-name="T8">VS Code</text:span></text:span><text:span text:style-name="T7">.</text:span></text:p>
        </text:list-item>
        <text:list-item>
          <text:p text:style-name="P26"><text:span text:style-name="T7">Crea un archivo nuevo llamado </text:span><text:span text:style-name="Source_20_Text"><text:span text:style-name="T9">mi_equipo_ia.py</text:span></text:span><text:span text:style-name="T7">.</text:span></text:p>
        </text:list-item>
        <text:list-item>
          <text:p text:style-name="P25"><text:span text:style-name="Strong_20_Emphasis"><text:span text:style-name="T8">Copia y pega</text:span></text:span><text:span text:style-name="T7"> el código que te pasé arriba.</text:span></text:p>
        </text:list-item>
        <text:list-item>
          <text:p text:style-name="P26"><text:span text:style-name="T7">Busca la línea que dice </text:span><text:span text:style-name="Source_20_Text"><text:span text:style-name="T9">"api_key": "TU_API_KEY_AQUÍ"</text:span></text:span><text:span text:style-name="T7"> y pega tu clave entre las comillas.</text:span></text:p>
        </text:list-item>
      </text:list>
      <text:p text:style-name="P21">Paso 4: ¿Cómo "encargar" algo determinado?</text:p>
      <text:p text:style-name="P27"><text:span text:style-name="T7">Para cambiar lo que quieres que hagan, no toques todo el código, solo ve a la </text:span><text:span text:style-name="Strong_20_Emphasis"><text:span text:style-name="T8">última parte</text:span></text:span><text:span text:style-name="T7"> (el mensaje final):</text:span></text:p>
      <text:p text:style-name="P22">Busca estas líneas al final del archivo:</text:p>
      <text:p text:style-name="P28">python</text:p>
      <text:p text:style-name="P19"><text:span text:style-name="Source_20_Text"><text:span text:style-name="T11">user_proxy.initiate_chat(</text:span></text:span></text:p>
      <text:p text:style-name="P29"><text:span text:style-name="Source_20_Text"><text:span text:style-name="T12"><text:s text:c="4"/></text:span></text:span><text:span text:style-name="Source_20_Text"><text:span text:style-name="T11">manager,</text:span></text:span></text:p>
      <text:p text:style-name="P19"><text:span text:style-name="Source_20_Text"><text:span text:style-name="T12"><text:s text:c="4"/></text:span></text:span><text:span text:style-name="Source_20_Text"><text:span text:style-name="T11">message="""ESCRIBE AQUÍ TU ENCARGO"""</text:span></text:span></text:p>
      <text:p text:style-name="P29"><text:span text:style-name="Source_20_Text"><text:span text:style-name="T11">)</text:span></text:span></text:p>
      <text:p text:style-name="P12"/>
      <text:p text:style-name="P10"><text:span text:style-name="Strong_20_Emphasis"><text:span text:style-name="T8">Ejemplo de encargo:</text:span></text:span><text:span text:style-name="T7"> </text:span><text:span text:style-name="Emphasis"><text:span text:style-name="T7">"Crea un sistema de login en Python que sea imposible de hackear mediante inyección SQL y explícame por qué es seguro"</text:span></text:span><text:span text:style-name="T7">.</text:span></text:p>
      <text:p text:style-name="P13">Paso 5: ¡A trabajar! (Ejecución)</text:p>
      <text:list text:style-name="L8">
        <text:list-item>
          <text:p text:style-name="P30"><text:span text:style-name="T7">En VS Code, abre la terminal integrada (arriba en el menú: </text:span><text:span text:style-name="Source_20_Text"><text:span text:style-name="T9">Terminal -&gt; New Terminal</text:span></text:span><text:span text:style-name="T7">).</text:span></text:p>
        </text:list-item>
        <text:list-item>
          <text:p text:style-name="P31">Escribe:</text:p>
          <text:p text:style-name="P32">bash</text:p>
          <text:p text:style-name="P33"><text:span text:style-name="Source_20_Text"><text:span text:style-name="T11">python mi_equipo_ia.py</text:span></text:span></text:p>
          <text:p text:style-name="P34">Usa el código con precaución.</text:p>
        </text:list-item>
        <text:list-item>
          <text:p text:style-name="P35"><text:span text:style-name="Strong_20_Emphasis"><text:span text:style-name="T8">Mira la pantalla:</text:span></text:span><text:span text:style-name="T7"> Verás cómo el "Programador" escribe una idea, el "Auditor" le contesta diciéndole que está mal, y el "Programador" corrige. Es como leer un chat de WhatsApp entre dos expertos.</text:span></text:p>
        </text:list-item>
      </text:list>
      <text:p text:style-name="P21"><text:soft-page-break/>Resumen de qué está pasando:</text:p>
      <text:list text:style-name="L9">
        <text:list-item>
          <text:p text:style-name="P36"><text:span text:style-name="Strong_20_Emphasis"><text:span text:style-name="T8">¿Cuándo se conectan?</text:span></text:span><text:span text:style-name="T7"> En el momento que escribes </text:span><text:span text:style-name="Source_20_Text"><text:span text:style-name="T9">python mi_equipo_ia.py</text:span></text:span><text:span text:style-name="T7">, el código llama a la API de OpenAI y despierta a los agentes.</text:span></text:p>
        </text:list-item>
        <text:list-item>
          <text:p text:style-name="P36"><text:span text:style-name="Strong_20_Emphasis"><text:span text:style-name="T8">¿Cómo se retroalimentan?</text:span></text:span><text:span text:style-name="T7"> Gracias a la configuración de </text:span><text:span text:style-name="Source_20_Text"><text:span text:style-name="T9">GroupChat</text:span></text:span><text:span text:style-name="T7">. Cuando uno termina de hablar, el </text:span><text:span text:style-name="Source_20_Text"><text:span text:style-name="T9">Manager</text:span></text:span><text:span text:style-name="T7"> (el jefe invisible) le pasa el turno al otro.</text:span></text:p>
        </text:list-item>
        <text:list-item>
          <text:p text:style-name="P37"><text:span text:style-name="Strong_20_Emphasis"><text:span text:style-name="T8">¿Cuándo termina?</text:span></text:span><text:span text:style-name="T7"> Cuando el Auditor de Seguridad esté contento y escriba la palabra "TERMINATE".</text:span></text:p>
        </text:list-item>
      </text:list>
      <text:p text:style-name="P38"><text:span text:style-name="T7"><text:line-break/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19:36:16.579124600</meta:creation-date>
    <dc:date>2026-05-02T19:49:50.244722500</dc:date>
    <meta:editing-duration>PT13M33S</meta:editing-duration>
    <meta:editing-cycles>1</meta:editing-cycles>
    <meta:document-statistic meta:table-count="0" meta:image-count="0" meta:object-count="0" meta:page-count="5" meta:paragraph-count="65" meta:word-count="1164" meta:character-count="7797" meta:non-whitespace-character-count="6673"/>
    <meta:generator>LibreOffice/25.8.5.2$Windows_X86_64 LibreOffice_project/9c8b85f387cc00a89945a79c9e6239f32e450ac2</meta:generator>
  </office:meta>
</office:document-meta>
</file>